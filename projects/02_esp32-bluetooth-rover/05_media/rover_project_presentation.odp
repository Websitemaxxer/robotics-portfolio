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0000001B65A62BE68.png" manifest:media-type="image/png"/>
  <manifest:file-entry manifest:full-path="Pictures/100000010000064900000329E028DB24.png" manifest:media-type="image/png"/>
  <manifest:file-entry manifest:full-path="Pictures/10000001000001DC00000322EBBE0AC7.png" manifest:media-type="image/png"/>
  <manifest:file-entry manifest:full-path="Pictures/10000000000002580000017F01CE2B4F.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4.341cm" fo:min-width="0cm" loext:decorative="false"/>
      <style:paragraph-properties style:writing-mode="lr-tb"/>
    </style:style>
    <style:style style:name="gr4" style:family="graphic" style:parent-style-name="standard">
      <style:graphic-properties draw:stroke="none" draw:fill="none" fo:min-height="2.60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style:text-properties fo:font-size="18pt" style:font-size-asian="18pt" style:font-size-complex="18pt"/>
    </style:style>
    <style:style style:name="P5" style:family="paragraph">
      <loext:graphic-properties draw:fill="none"/>
      <style:text-properties fo:font-size="22pt" style:font-size-asian="22pt" style:font-size-complex="22pt"/>
    </style:style>
    <style:style style:name="P6" style:family="paragraph">
      <loext:graphic-properties draw:fill="none" draw:fill-color="#ffffff"/>
    </style:style>
    <style:style style:name="P7" style:family="paragraph">
      <style:text-properties fo:font-size="22pt" style:font-size-asian="22pt" style:font-size-complex="22pt"/>
    </style:style>
    <style:style style:name="P8" style:family="paragraph">
      <style:paragraph-properties fo:margin-top="0.42cm" fo:margin-bottom="0.35cm"/>
      <style:text-properties fo:font-size="10pt" style:font-size-asian="10pt" style:font-size-complex="10pt"/>
    </style:style>
    <style:style style:name="T1" style:family="text">
      <style:text-properties style:text-position="super 58%"/>
    </style:style>
    <style:style style:name="T2" style:family="text">
      <style:text-properties fo:font-size="22pt" style:font-size-asian="22pt" style:font-size-complex="22pt"/>
    </style:style>
    <style:style style:name="T3" style:family="text">
      <style:text-properties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Arduino Rover Project</text:p>
          </draw:text-box>
        </draw:frame>
        <draw:frame presentation:style-name="pr2" draw:text-style-name="P1" draw:layer="layout" svg:width="25.199cm" svg:height="9.134cm" svg:x="1.4cm" svg:y="3.685cm" presentation:class="subtitle">
          <draw:text-box>
            <text:p>Kush Kumar</text:p>
            <text:p>Febuary 21<text:span text:style-name="T1">st</text:span> 2026</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Project Description</text:p>
          </draw:text-box>
        </draw:frame>
        <draw:frame presentation:style-name="pr4" draw:layer="layout" svg:width="25.199cm" svg:height="9.134cm" svg:x="1.4cm" svg:y="3.685cm" presentation:class="outline" presentation:user-transformed="true">
          <draw:text-box>
            <text:list text:style-name="L2">
              <text:list-header>
                <text:p>We are building a simple, mobile, rover controlled by a remote ring. This was made using arduino code and simple mechanical assembly of parts such as motors, screws, nuts, wires, arduino board, etc. </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Connection Diagram</text:p>
          </draw:text-box>
        </draw:frame>
        <draw:frame draw:style-name="gr2" draw:text-style-name="P2" draw:layer="layout" svg:width="10.499cm" svg:height="5.278cm" svg:x="0.101cm" svg:y="10.322cm">
          <draw:image xlink:href="Pictures/100000010000064900000329E028DB24.png" xlink:type="simple" xlink:show="embed" xlink:actuate="onLoad" draw:mime-type="image/png">
            <text:p/>
          </draw:image>
        </draw:frame>
        <draw:frame draw:style-name="gr2" draw:text-style-name="P2" draw:layer="layout" svg:width="4.706cm" svg:height="7.931cm" svg:x="22.907cm" svg:y="7.5cm">
          <draw:image xlink:href="Pictures/10000001000001DC00000322EBBE0AC7.png" xlink:type="simple" xlink:show="embed" xlink:actuate="onLoad" draw:mime-type="image/png">
            <text:p/>
          </draw:image>
        </draw:frame>
        <draw:frame draw:style-name="gr3" draw:text-style-name="P3" draw:layer="layout" svg:width="23.486cm" svg:height="4.591cm" svg:x="2.014cm" svg:y="3.038cm">
          <draw:text-box>
            <text:p><text:span text:style-name="T2">To plan out the parts assembly and wire connection I made schematics </text:span><text:span text:style-name="T2">on how the wires would be connected as well as the components on the </text:span><text:span text:style-name="T2">fritzing platform. Visualizing this allowed me to better understand my </text:span><text:span text:style-name="T2">next steps as well as how each step helps and contributes to the end </text:span><text:span text:style-name="T2">goal. </text:span></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Dev, Pipeline</text:p>
          </draw:text-box>
        </draw:frame>
        <draw:frame presentation:style-name="pr4" draw:layer="layout" svg:width="25.199cm" svg:height="9.134cm" svg:x="1.4cm" svg:y="3.685cm" presentation:class="outline" presentation:user-transformed="true">
          <draw:text-box>
            <text:list text:style-name="L2">
              <text:list-item>
                <text:p>I have attached two motors on the bottom of the board so that the whells can be attached later.</text:p>
              </text:list-item>
              <text:list-item>
                <text:p>I have attached two lego pieces such that they hold the board up so that it is slightly elevated</text:p>
              </text:list-item>
              <text:list-item>
                <text:p>I have screwed two cylindrical parts which will hold the battery that powers the rover. </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Components</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3">DRV 8833</text:span></text:p>
              </text:list-item>
              <text:list-item>
                <text:p><text:span text:style-name="T3">2 Motors</text:span></text:p>
              </text:list-item>
              <text:list-item>
                <text:p><text:span text:style-name="T3">Rover Body(plastic board)</text:span></text:p>
              </text:list-item>
              <text:list-item>
                <text:p><text:span text:style-name="T3">Technic Pieces</text:span></text:p>
              </text:list-item>
              <text:list-item>
                <text:p><text:span text:style-name="T3">Arduino Shaft </text:span></text:p>
              </text:list-item>
              <text:list-item>
                <text:p><text:span text:style-name="T3">ESP-32</text:span></text:p>
              </text:list-item>
              <text:list-item>
                <text:p><text:span text:style-name="T3">9V Battery</text:span></text:p>
              </text:list-item>
              <text:list-item>
                <text:p><text:span text:style-name="T3">Bluetooth Ring</text:span></text:p>
              </text:list-item>
              <text:list-item>
                <text:p><text:span text:style-name="T3">USB Cabl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H Bridge</text:p>
          </draw:text-box>
        </draw:frame>
        <draw:frame draw:style-name="gr4" draw:text-style-name="P5" draw:layer="layout" svg:width="27.083cm" svg:height="2.855cm" svg:x="0.417cm" svg:y="3.615cm">
          <draw:text-box>
            <text:p><text:span text:style-name="T2">The H bridge is an electronical circuit that consists of four different switches that allow for bidirectional flow. This allows the motor to go forward, backward, or stop by switching the polarity of voltage applied. </text:span></text:p>
          </draw:text-box>
        </draw:frame>
        <draw:frame draw:style-name="gr2" draw:text-style-name="P2" draw:layer="layout" svg:width="10.183cm" svg:height="6.5cm" svg:x="0.2cm" svg:y="8cm">
          <draw:image xlink:href="Pictures/10000000000002580000017F01CE2B4F.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PWM</text:p>
          </draw:text-box>
        </draw:frame>
        <draw:frame draw:style-name="gr2" draw:text-style-name="P2" draw:layer="layout" svg:width="7.673cm" svg:height="8.402cm" svg:x="19.827cm" svg:y="7cm">
          <draw:image xlink:href="Pictures/1000000100000190000001B65A62BE68.png" xlink:type="simple" xlink:show="embed" xlink:actuate="onLoad" draw:mime-type="image/png">
            <text:p/>
          </draw:image>
        </draw:frame>
        <draw:frame draw:style-name="gr5" draw:text-style-name="P6" draw:layer="layout" svg:width="26.5cm" svg:height="4.517cm" svg:x="0.558cm" svg:y="2.949cm">
          <draw:text-box>
            <text:p>PWM, Pulse Width Modulation, is an efficient technique that allows analogue devices(LED’s, motors, etc. ) to be controlled by digital means. It works by rapidly switching the power on and off. We can not control the speed of a motor by changing the voltage as they are not linear; 50 percent voltage does not equate to 50 percent motor speed. To achieve this we control the ‘on time’ or the width of the pulse. The longer the pulse width, the higher the speed. This also applies to LED’s and their brightness.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Bluetooth Ring</text:p>
          </draw:text-box>
        </draw:frame>
        <draw:frame presentation:style-name="pr4" draw:text-style-name="P7" draw:layer="layout" svg:width="25.199cm" svg:height="9.134cm" svg:x="1.4cm" svg:y="3.685cm" presentation:class="outline" presentation:user-transformed="true">
          <draw:text-box>
            <text:list text:style-name="L2">
              <text:list-header>
                <text:p><text:span text:style-name="T2">I used a bluetooth ring that had 4 different buttons; forward, backward, left, right, stop. </text:span></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Arduino C Code</text:p>
          </draw:text-box>
        </draw:frame>
        <draw:frame presentation:style-name="pr4" draw:layer="layout" svg:width="27.001cm" svg:height="12.5cm" svg:x="0.499cm" svg:y="3cm" presentation:class="outline" presentation:user-transformed="true">
          <draw:text-box>
            <text:p text:style-name="P8">#include &lt;NimBLEDevice.h&gt;bool doConnect = false;bool isConnected = false;uint32_t scanTimeMs = 5000;</text:p>
            <text:p text:style-name="P8">enum CarCommand : uint8_t { STOP, FORWARD, BACKWARD, LEFT, RIGHT };CarCommand currentCommand = STOP;CarCommand prevCommand = STOP;</text:p>
            <text:p text:style-name="P8">static bool     clickActive = false;static uint8_t  clickGroup  = 0;static int16_t  firstX = 0, firstY = 0;static int16_t  lastX  = 0, lastY  = 0;static uint16_t activeCount = 0;</text:p>
            <text:p text:style-name="P8">const char* targetAddrStr = "73:56:17:d7:39:ab";</text:p>
            <text:p text:style-name="P8">static NimBLEAddress ringAddr;static bool haveRingAddr = false;</text:p>
            <text:p text:style-name="P8">static void startScanNow();static void scanCompleteCB(NimBLEScanResults results);</text:p>
            <text:p text:style-name="P8">static uint32_t lastScanKickMs = 0;static volatile uint32_t lastOnResultMs = 0;</text:p>
            <text:p text:style-name="P8">static void resetBluetoothStack() {  Serial.println("RESET BLE STACK...");</text:p>
            <text:p text:style-name="P8">  NimBLEScan* s = NimBLEDevice::getScan();  if (s) {    s-&gt;stop();    s-&gt;clearResults();  }</text:p>
            <text:p text:style-name="P8">  NimBLEDevice::deinit(true);  delay(80);</text:p>
            <text:p text:style-name="P8">  NimBLEDevice::init("");  NimBLEDevice::deleteAllBonds();</text:p>
            <text:p text:style-name="P8">  lastScanKickMs = millis();  lastOnResultMs = millis();</text:p>
            <text:p text:style-name="P8">  startScanNow();}</text:p>
            <text:p text:style-name="P8">class ClientCallbacks : public NimBLEClientCallbacks {  void onConnect(NimBLEClient* pClient) override {    isConnected = true;  }  void onDisconnect(NimBLEClient* pClient, int reason) override {    isConnected = false;    startScanNow();  }} clientCallbacks;</text:p>
            <text:p text:style-name="P8">class ScanCallbacks : public NimBLEScanCallbacks {  void onResult(const NimBLEAdvertisedDevice* d) override {</text:p>
            <text:p text:style-name="P8">    lastOnResultMs = millis();    static uint32_t lastMarkMs = 0;    uint32_t now = millis();    if (now - lastMarkMs &gt; 250) {      Serial.println("***");      lastMarkMs = now;    }</text:p>
            <text:p text:style-name="P8">    if (!d-&gt;isAdvertisingService(NimBLEUUID((uint16_t)0x1812))) return;</text:p>
            <text:p text:style-name="P8">    std::string macStr = d-&gt;getAddress().toString();    Serial.print("\n Found device MAC: ");    Serial.println(macStr.c_str());</text:p>
            <text:p text:style-name="P8">    if (strcasecmp(macStr.c_str(), targetAddrStr) != 0) return;</text:p>
            <text:p text:style-name="P8">    Serial.println("Found MY device!");    ringAddr = d-&gt;getAddress();    haveRingAddr = true;</text:p>
            <text:p text:style-name="P8">    NimBLEDevice::getScan()-&gt;stop();    doConnect = true;  }} scanCallbacks;</text:p>
            <text:p text:style-name="P8">static void startScanNow() {  NimBLEScan* pScan = NimBLEDevice::getScan();  pScan-&gt;stop();  pScan-&gt;clearResults();  delay(10);</text:p>
            <text:p text:style-name="P8">  pScan-&gt;setScanCallbacks(&amp;scanCallbacks, false);  pScan-&gt;setInterval(100);  pScan-&gt;setWindow(100);  pScan-&gt;setActiveScan(false);  Serial.println("Scan start");  pScan-&gt;start(scanTimeMs, scanCompleteCB, false);  lastScanKickMs = millis();}</text:p>
            <text:p text:style-name="P8">static void scanCompleteCB(NimBLEScanResults results) {  if (!isConnected &amp;&amp; !doConnect) {    Serial.println("Scan ended -&gt; restart");    startScanNow();  } else {    Serial.println("Scan ended");  }}</text:p>
            <text:p text:style-name="P8">static inline int16_t u16le_to_i16(uint8_t lo, uint8_t hi) {  uint16_t u = (uint16_t)lo | ((uint16_t)hi &lt;&lt; 8);  return (int16_t)u;}</text:p>
            <text:p text:style-name="P8">void notifyCB(NimBLERemoteCharacteristic* pRemoteCharacteristic,              uint8_t* pData, size_t length, bool isNotify) {  if (length &lt; 8) return;</text:p>
            <text:p text:style-name="P8">  bool active  = (pData[6] != 0);  bool release = (pData[6] == 0 &amp;&amp; pData[7] == 0);</text:p>
            <text:p text:style-name="P8">  if (active) {    int16_t x = u16le_to_i16(pData[2], pData[3]);    int16_t y = u16le_to_i16(pData[4], pData[5]);</text:p>
            <text:p text:style-name="P8">    if (!clickActive) {      clickActive = true;      clickGroup = pData[1];      firstX = lastX = x;      firstY = lastY = y;      activeCount = 1;    } else {      lastX = x;      lastY = y;      activeCount++;    }    return;  }</text:p>
            <text:p text:style-name="P8">  if (release) {    if (!clickActive) return;</text:p>
            <text:p text:style-name="P8">    if (clickGroup == 6 &amp;&amp; activeCount == 1 &amp;&amp; firstX == 1200 &amp;&amp; firstY == 1012) {      currentCommand = STOP;    } else if (clickGroup == 7) {      currentCommand = STOP;    } else if (clickGroup == 4 || clickGroup == 5) {      if (lastX &lt; firstX) currentCommand = LEFT;      else if (lastX &gt; firstX) currentCommand = RIGHT;      else currentCommand = STOP;    } else if (clickGroup == 6) {      if (lastY &lt; firstY) currentCommand = FORWARD;      else if (lastY &gt; firstY) currentCommand = BACKWARD;      else currentCommand = STOP;    } else {      currentCommand = STOP;    }</text:p>
            <text:p text:style-name="P8">    Serial.print("CLICK: ");    Serial.println((int)currentCommand);</text:p>
            <text:p text:style-name="P8">    clickActive = false;    clickGroup = 0;    activeCount = 0;    return;  }}</text:p>
            <text:p text:style-name="P8">void connectToServer() {  Serial.println("Start connectToServer");  doConnect = false;</text:p>
            <text:p text:style-name="P8">  if (!haveRingAddr) {    Serial.println("No ringAddr -&gt; rescan");    startScanNow();    return;  }</text:p>
            <text:p text:style-name="P8">  NimBLEClient* pClient = NimBLEDevice::createClient();  pClient-&gt;setClientCallbacks(&amp;clientCallbacks, false);</text:p>
            <text:p text:style-name="P8">  // connect по адресу  if (!pClient-&gt;connect(ringAddr)) {    NimBLEDevice::deleteClient(pClient);    Serial.println("Client is not ready");    delay(100);    resetBluetoothStack();    return;  }</text:p>
            <text:p text:style-name="P8">  Serial.println("Client is ready");</text:p>
            <text:p text:style-name="P8">  NimBLERemoteService* pSvc = pClient-&gt;getService(NimBLEUUID((uint16_t)0x1812));  if (!pSvc) {    Serial.println("HID service not found");    pClient-&gt;disconnect();    delay(100);    resetBluetoothStack();    return;  }</text:p>
            <text:p text:style-name="P8">  Serial.println("Get Characteristics");  auto chars = pSvc-&gt;getCharacteristics(true);  int subCount = 0;</text:p>
            <text:p text:style-name="P8">  for (auto chr : chars) {    if (chr-&gt;getUUID().equals(NimBLEUUID((uint16_t)0x2A4D)) &amp;&amp; chr-&gt;canNotify()) {      if (chr-&gt;subscribe(true, notifyCB)) {        Serial.print("Subscribed to Handle: 0x");        Serial.println(chr-&gt;getHandle(), HEX);        ++subCount;      } else {        Serial.print("Failed to subscribe to Handle: 0x");        Serial.println(chr-&gt;getHandle(), HEX);      }    }  }</text:p>
            <text:p text:style-name="P8">  if (subCount == 0) {    Serial.println("No notifiable 0x2A4D characteristic found!");    pClient-&gt;disconnect();    delay(100);    resetBluetoothStack();    return;  }</text:p>
            <text:p text:style-name="P8">  isConnected = true;}</text:p>
            <text:p text:style-name="P8">int stopCounter = 0;     // global varint in1 = 25;  // motorAbool isDriverOn = false;int state = 0; // 0 means stop, 1 will be forwards, 2 will be backwards, 3 will be left, and 4 will be right. </text:p>
            <text:p text:style-name="P8">// void driverOff(){//     digitalWrite(27, LOW);  // eep//     digitalWrite(2, LOW);//     isDriverOn = false;// }</text:p>
            <text:p text:style-name="P8">// void driverOn(){//     digitalWrite(27, HIGH);  // eep//     digitalWrite(2, HIGH);//     isDriverOn = true;// }</text:p>
            <text:p text:style-name="P8">void goForward() { // function that allows motors to move in forward direction  // if(!isDriverOn){  //   driverOn();  // }  digitalWrite(27, HIGH);  analogWrite(17, 0);   analogWrite(16, 255);  analogWrite(25, 255);  analogWrite(26, 0);}</text:p>
            <text:p text:style-name="P8">void goBackward() { // function that allows motors to move in backward direction by swapping value from the previous function   //   if(!isDriverOn){  //   driverOn();  // }  digitalWrite(27, HIGH);  analogWrite(17, 255);   analogWrite(16, 0);  analogWrite(25, 0);  analogWrite(26, 255);}</text:p>
            <text:p text:style-name="P8">void goRight() {  //   if(!isDriverOn){  //   driverOn();  // }  digitalWrite(27, HIGH);  analogWrite(17, 0);  analogWrite(16, 255);  analogWrite(25, 0);  analogWrite(26, 255);}</text:p>
            <text:p text:style-name="P8">void goLeft() {  //   if(!isDriverOn){  //   driverOn();  // }   digitalWrite(27, HIGH);  analogWrite(17, 255);  analogWrite(16, 0);  analogWrite(25, 255);  analogWrite(26, 0);}</text:p>
            <text:p text:style-name="P8">void stopAll(){ // this function sets all movements to zero so motors stop.   //   if(!isDriverOn){  //   driverOn();  // }  analogWrite(16, 0);  analogWrite(17, 0);  analogWrite(25, 0);  analogWrite(26, 0);  digitalWrite(27, LOW);}</text:p>
            <text:p text:style-name="P8"/>
            <text:p text:style-name="P8"/>
            <text:p text:style-name="P8"/>
            <text:p text:style-name="P8">void setup(){  Serial.begin(9600);  delay(200);  NimBLEDevice::init("");  NimBLEDevice::deleteAllBonds();  lastScanKickMs = millis();  lastOnResultMs = millis();  startScanNow();</text:p>
            <text:p text:style-name="P8">  pinMode(2, OUTPUT);    pinMode(27, OUTPUT);  // eep pin  pinMode(26, OUTPUT);  // motorA  pinMode(25, OUTPUT);  // motorB  pinMode(16, OUTPUT);  // rx pin  pinMode(17, OUTPUT);  // tx pin  delay(10);  // driverOn();</text:p>
            <text:p text:style-name="P8">  digitalWrite(2, LOW);}void loop(){  if (doConnect) {    connectToServer();</text:p>
            <text:p text:style-name="P8">  }  if (isConnected) {    digitalWrite(2, HIGH);    if (currentCommand == FORWARD) {      Serial.println("currentCommand == FORWARD");      if(prevCommand != FORWARD){        goForward();      }    } else if (currentCommand == BACKWARD) {      Serial.println("currentCommand == BACKWARD");      if(prevCommand != BACKWARD){          goBackward();      }    } else if (currentCommand == LEFT) {      Serial.println("currentCommand == LEFT");      if(prevCommand != LEFT){        goLeft();      }    } else if (currentCommand == RIGHT) {      Serial.println("currentCommand == RIGHT");      if(prevCommand != RIGHT) {        goRight();      }    } else if (currentCommand == STOP) {      Serial.println("currentCommand == STOP");      if(prevCommand != STOP) {        stopAll();      }    }    prevCommand = currentCommand;    delay(50);  }  uint32_t now = millis();  if (!isConnected &amp;&amp; !doConnect &amp;&amp; (now - lastScanKickMs &gt; 2000)) {    lastScanKickMs = now;</text:p>
            <text:p text:style-name="P8">    if (now - (uint32_t)lastOnResultMs &gt; 6000) {      Serial.println("WD: scan stuck -&gt; reset BLE");      resetBluetoothStack();    } else {      if (!NimBLEDevice::getScan()-&gt;isScanning()) {        Serial.println("WD: scan not running -&gt; restart");        startScanNow();      }    }  }</text:p>
            <text:p text:style-name="P8">    delay(2);}</text:p>
            <text:p text:style-name="P8"/>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user-transformed="true">
          <draw:text-box>
            <text:p>3D Modelling</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16T15:16:05.189588000</meta:creation-date>
    <dc:date>2026-02-20T15:33:21.005401900</dc:date>
    <meta:editing-duration>PT2H29M17S</meta:editing-duration>
    <meta:editing-cycles>7</meta:editing-cycles>
    <meta:generator>LibreOffice/25.8.3.2$Windows_X86_64 LibreOffice_project/8ca8d55c161d602844f5428fa4b58097424e324e</meta:generator>
    <meta:document-statistic meta:object-count="64"/>
  </office:meta>
</office:document-meta>
</file>